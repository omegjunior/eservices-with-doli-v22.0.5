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line-height="150%" fo:text-align="justify" style:justify-single-word="false"/>
    </style:style>
    <style:style style:name="P4" style:family="paragraph" style:parent-style-name="Standard">
      <style:text-properties fo:font-size="11pt" style:font-size-asian="11pt" style:font-size-complex="11pt"/>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5">CELEBRET</text:p>
      <text:p text:style-name="P4"/>
      <text:p text:style-name="P4"/>
      <text:p text:style-name="Standard"/>
      <text:p text:style-name="P3"><text:tab/>Je, soussigné Roger HOUNGBEDJI o.p., Archevêque de Cotonou, atteste que l’abbé {object_options_12_nometprnom}, né le {object_options_12_datedenaissance} à {object_options_12_lieudenaissance}, de nationalité {object_options_12_nationalit}, ordonné prêtre le {object_options_12_datedordination}, est prêtre de l’Archidiocèse de Cotonou.</text:p>
      <text:p text:style-name="P3"/>
      <text:p text:style-name="P3"><text:tab/>Je le recommande pour qu’il soit accueilli avec bienveillance par tous les curés ou recteurs des églises où il se présentera et qu’on lui donne la faculté de célébrer la messe, d’entendre les confessions et d’exercer les autres charges sacerdotales.</text:p>
      <text:p text:style-name="P3"/>
      <text:p text:style-name="P3"><text:tab/>Ce CELEBRET est valable 2 ans.</text:p>
      <text:p text:style-name="P3"/>
      <text:p text:style-name="P3"><text:tab/>Donné à Cotonou le {object_date_creation}</text:p>
      <text:p text:style-name="P2"/>
      <text:p text:style-name="P2"/>
      <text:p text:style-name="P2"/>
      <text:p text:style-name="P3"><text:tab/><text:tab/><text:tab/><text:tab/><text:tab/><text:tab/><text:tab/><text:tab/>+ Roger HOUNGBEDJI, op</text:p>
      <text:p text:style-name="P3"><text:s text:c="4"/><text:tab/><text:tab/><text:tab/><text:tab/><text:tab/><text:tab/><text:tab/><text:tab/> <text:s text:c="3"/>Archevêque de Coton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mega Junior</meta:initial-creator>
    <meta:creation-date>2024-12-13T00:17:56.36</meta:creation-date>
    <dc:date>2024-12-13T02:28:55.89</dc:date>
    <dc:creator>Omega Junior</dc:creator>
    <meta:editing-duration>PT7M39S</meta:editing-duration>
    <meta:editing-cycles>4</meta:editing-cycles>
    <meta:generator>OpenOffice/4.1.15$Win32 OpenOffice.org_project/4115m2$Build-9813</meta:generator>
    <meta:document-statistic meta:table-count="0" meta:image-count="0" meta:object-count="0" meta:page-count="1" meta:paragraph-count="7" meta:word-count="89" meta:character-count="733"/>
  </office:meta>
</office:document-meta>
</file>