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text-properties style:font-size-complex="12pt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2pt" style:font-size-asian="12pt" style:font-size-complex="12pt"/>
    </style:style>
    <style:style style:name="P7" style:family="paragraph" style:parent-style-name="Heading_20_1">
      <style:text-properties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size-complex="12pt"/>
    </style:style>
    <style:style style:name="T2" style:family="text">
      <style:text-properties style:use-window-font-color="true"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style:use-window-font-color="true" style:font-name="Times New Roman" fo:font-size="14pt" fo:font-weight="normal" style:font-name-asian="Times New Roman1" style:font-size-asian="14pt" style:language-asian="fr" style:country-asian="FR" style:font-weight-asian="normal" style:font-name-complex="Times New Roman1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Standard"/>
      <text:p text:style-name="P1"/>
      <text:p text:style-name="P1"/>
      <text:p text:style-name="P1"/>
      <text:p text:style-name="Standard"/>
      <text:p text:style-name="P1"/>
      <text:p text:style-name="P1"/>
      <text:list xml:id="list8984768199032404118" text:style-name="Outline">
        <text:list-item>
          <text:h text:style-name="P7" text:outline-level="1">A T T E S T A T I O N</text:h>
        </text:list-item>
      </text:list>
      <text:p text:style-name="P4"/>
      <text:p text:style-name="P4"/>
      <text:p text:style-name="Text_20_body"><text:span text:style-name="T1"><text:tab/>Je, soussigné Monseigneur Roger HOUNGBEDJI o.p., Archevêque de Cotonou, atteste par la présente que </text:span><text:span text:style-name="T4">{object_options_3_titrecivilit}</text:span> <text:span text:style-name="T5">{object_options_3_nometprnom}</text:span><text:span text:style-name="T2"> </text:span><text:span text:style-name="T1">est {object_options_3_statutetatdevie} [!-- IF {object_options_3_rattachement_2} --] de l'Institut religieux ou Congrégation : [!-- ELSE {object_options_3_rattachement_2} --] du [!-- ENDIF {object_options_3_rattachement_2} --]</text:span><text:span text:style-name="T6">[!-- IF {object_options_3_autrediocseinstitutcongrgation} --] </text:span><text:span text:style-name="T7">{object_options_3_autrediocseinstitutcongrgation}</text:span><text:span text:style-name="T6"> [!-- ELSE {object_options_3_autrediocseinstitutcongrgation} --] </text:span><text:span text:style-name="T7">{object_options_3_diocseinstitutcongrgation}</text:span><text:span text:style-name="T6">[!-- ENDIF {object_options_3_autrediocseinstitutcongrgation} --][!-- IF {object_options_3_missionautreprcision} --], actuellement {object_options_3_missionautreprcision}.[!-- ELSE {object_options_3_missionautreprcision} --].[!-- ENDIF {object_options_3_missionautreprcision} --]</text:span></text:p>
      <text:p text:style-name="P5"/>
      <text:p text:style-name="P5"><text:tab/>[!-- IF {object_options_3_sexe_2} --]Elle est autorisée[!-- ELSE {object_options_3_sexe_2} --]Il est autorisé[!-- ENDIF {object_options_3_sexe_2} --][!-- IF {object_options_3_rattachement_2} --] par [!-- IF {object_options_3_sexe_2} --]sa supérieure légitime[!-- ELSE {object_options_3_sexe_2} --]son supérieur légitime[!-- ENDIF {object_options_3_sexe_2} --][!-- ENDIF {object_options_3_rattachement_2} --] à se rendre à {object_options_3_villededestination} ({object_options_3_paysdedestination}), du {object_options_3_datededpart} au {object_options_3_datederetour}, pour le motif [!-- IF {object_options_3_autremotif} --]« {object_options_3_autremotif} »[!-- ELSE {object_options_3_autremotif} --]« {object_options_3_motifduvoyage} »[!-- ENDIF {object_options_3_autremotif} --], en réponse à l’invitation de {object_options_3_identitetfonctiondelhte}. </text:p>
      <text:p text:style-name="P5"/>
      <text:p text:style-name="P5"><text:tab/>Durant son séjour, [!-- IF {object_options_3_sexe_2} --] elle [!-- ELSE {object_options_3_sexe_2} --] il [!-- ENDIF {object_options_3_sexe_2} --] résidera à l’adresse suivante : {object_options_3_adressedesjour}.</text:p>
      <text:p text:style-name="P5"/>
      <text:p text:style-name="P6">Tout son séjour sera pris en charge par son hôte.<text:bookmark text:name="Bookmark"/></text:p>
      <text:p text:style-name="P5"/>
      <text:p text:style-name="P5"><text:tab/>En foi de quoi je délivre la présente attestation pour servir et valoir ce que de droit.</text:p>
      <text:p text:style-name="P5"/>
      <text:p text:style-name="P5"><text:tab/>Fait à Cotonou, le {current_date}<text:tab/></text:p>
      <text:p text:style-name="P3"/>
      <text:p text:style-name="P3"/>
      <text:p text:style-name="P3"/>
      <text:p text:style-name="P2"><text:soft-page-break/><text:tab/><text:tab/><text:tab/><text:tab/><text:tab/><text:tab/> <text:s text:c="3"/>+ Roger HOUNGBEDJI o.p.</text:p>
      <text:p text:style-name="P2"><text:s text:c="19"/><text:tab/><text:tab/><text:tab/><text:tab/><text:tab/> <text:s text:c="7"/>Archevêque de Coton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size="12pt" style:font-name-asian="Times New Roman1" style:font-size-asian="12pt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dc:creator>Omega Junior</dc:creator>
    <meta:editing-cycles>59</meta:editing-cycles>
    <meta:creation-date>2024-08-02T09:42:00</meta:creation-date>
    <dc:date>2026-06-01T19:06:05.21</dc:date>
    <meta:editing-duration>P6DT2H29M8S</meta:editing-duration>
    <meta:generator>OpenOffice/4.1.15$Win32 OpenOffice.org_project/4115m2$Build-9813</meta:generator>
    <meta:document-statistic meta:table-count="0" meta:image-count="0" meta:object-count="0" meta:page-count="2" meta:paragraph-count="9" meta:word-count="224" meta:character-count="22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