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Text_20_body">
      <style:text-properties style:font-size-complex="12pt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Heading_20_1">
      <style:text-properties style:font-size-complex="12pt"/>
    </style:style>
    <style:style style:name="T1" style:family="text">
      <style:text-properties style:font-size-complex="12pt"/>
    </style:style>
    <style:style style:name="T2" style:family="text">
      <style:text-properties style:use-window-font-color="true" style:font-name="Times New Roman" fo:font-size="14pt" fo:font-weight="bold" style:font-name-asian="Times New Roman1" style:font-size-asian="14pt" style:language-asian="fr" style:country-asian="FR" style:font-weight-asian="bold" style:font-name-complex="Times New Roman1" style:font-size-complex="12pt" style:font-weight-complex="bold"/>
    </style:style>
    <style:style style:name="T3" style:family="text">
      <style:text-properties style:use-window-font-color="true" style:font-name="Times New Roman" fo:font-size="14pt" fo:font-weight="normal" style:font-name-asian="Times New Roman1" style:font-size-asian="14pt" style:language-asian="fr" style:country-asian="FR" style:font-weight-asian="normal" style:font-name-complex="Times New Roman1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ext:p text:style-name="P1"/>
      <text:p text:style-name="Standard"/>
      <text:p text:style-name="P1"/>
      <text:p text:style-name="P1"/>
      <text:p text:style-name="P1"/>
      <text:p text:style-name="Standard"/>
      <text:p text:style-name="P1"/>
      <text:p text:style-name="P1"/>
      <text:list xml:id="list268853186379131100" text:style-name="Outline">
        <text:list-item>
          <text:h text:style-name="P7" text:outline-level="1">A T T E S T A T I O N</text:h>
        </text:list-item>
      </text:list>
      <text:p text:style-name="P4"/>
      <text:p text:style-name="P4"/>
      <text:p text:style-name="Text_20_body"><text:span text:style-name="T1"><text:tab/>Je, soussigné Monseigneur Roger HOUNGBEDJI o.p., Archevêque de Cotonou, atteste par la présente que </text:span><text:span text:style-name="T3">l'abbé</text:span> <text:span text:style-name="T4">{object_options_4_nometprnom}</text:span><text:span text:style-name="T2"> </text:span><text:span text:style-name="T1">est prêtre du <text:s/></text:span><text:span text:style-name="T5">[!-- IF {object_options_4_autrediocseinstitutcongrgation} --] </text:span><text:span text:style-name="T6">{object_options_4_autrediocseinstitutcongrgation}</text:span><text:span text:style-name="T5"> [!-- ELSE {object_options_4_autrediocseinstitutcongrgation} --] </text:span><text:span text:style-name="T6">{object_options_4_diocseinstitutcongrgation}</text:span><text:span text:style-name="T5">[!-- ENDIF {object_options_4_autrediocseinstitutcongrgation} --][!-- IF {object_options_4_missionautreprcision} --], actuellement {object_options_4_missionautreprcision}.[!-- ELSE {object_options_4_missionautreprcision} --].[!-- ENDIF {object_options_4_missionautreprcision} --]</text:span></text:p>
      <text:p text:style-name="P5"/>
      <text:p text:style-name="P5"><text:tab/>Il est autorisé à se rendre dans le diocèse de {object_options_4_diocsededestination} ({object_options_4_paysdedestination}), du {object_options_4_datededpart} au {object_options_4_datederetour}, pour le motif [!-- IF {object_options_4_autremotif} --]« {object_options_4_autremotif} »[!-- ELSE {object_options_4_autremotif} --]« {object_options_4_motifduvoyage} »[!-- ENDIF {object_options_4_autremotif} --]. </text:p>
      <text:p text:style-name="P5"/>
      <text:p text:style-name="P5"><text:tab/>En foi de quoi je délivre la présente attestation pour servir et valoir ce que de droit.</text:p>
      <text:p text:style-name="P5"/>
      <text:p text:style-name="P5"><text:tab/>Fait à Cotonou, le {current_date}<text:tab/></text:p>
      <text:p text:style-name="P3"/>
      <text:p text:style-name="P3"/>
      <text:p text:style-name="P3"/>
      <text:p text:style-name="P2"><text:tab/><text:tab/><text:tab/><text:tab/><text:tab/><text:tab/> <text:s text:c="3"/>+ Roger HOUNGBEDJI o.p.</text:p>
      <text:p text:style-name="P2"><text:s text:c="19"/><text:tab/><text:tab/><text:tab/><text:tab/><text:tab/> <text:s text:c="7"/>Archevêque de Coton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0pt" style:font-name-asian="Times New Roman1" style:font-size-asian="10pt" style:language-asian="fr" style:country-asian="FR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Times New Roman" fo:font-size="12pt" fo:font-weight="bold" style:font-name-asian="Times New Roman1" style:font-size-asian="12pt" style:language-asian="fr" style:country-asian="FR" style:font-weight-asian="bold" style:font-name-complex="Times New Roman1" style:font-size-complex="10pt"/>
    </style:style>
    <style:style style:name="Corps_20_de_20_texte_20_Car" style:display-name="Corps de texte Car" style:family="text" style:parent-style-name="Default_20_Paragraph_20_Font">
      <style:text-properties style:font-name="Times New Roman" fo:font-size="12pt" style:font-name-asian="Times New Roman1" style:font-size-asian="12pt" style:language-asian="fr" style:country-asian="FR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P</meta:initial-creator>
    <dc:creator>Omega Junior</dc:creator>
    <meta:editing-cycles>62</meta:editing-cycles>
    <meta:creation-date>2024-08-02T09:42:00</meta:creation-date>
    <dc:date>2025-01-30T09:55:30.49</dc:date>
    <meta:editing-duration>P5DT21H36M35S</meta:editing-duration>
    <meta:generator>OpenOffice/4.1.15$Win32 OpenOffice.org_project/4115m2$Build-9813</meta:generator>
    <meta:document-statistic meta:table-count="0" meta:image-count="0" meta:object-count="0" meta:page-count="1" meta:paragraph-count="7" meta:word-count="125" meta:character-count="12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