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ffffff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color="#fffff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7">ATTESTATION</text:p>
      <text:p text:style-name="P2"/>
      <text:p text:style-name="P2"/>
      <text:p text:style-name="Standard"/>
      <text:p text:style-name="P8"><text:tab/><text:span text:style-name="T3">Je, soussigné Roger HOUNGBEDJI o.p., Archevêque de Cotonou, atteste par la présente que</text:span></text:p>
      <text:p text:style-name="P9">{object_options_2_nometprnom}</text:p>
      <text:p text:style-name="P10">est</text:p>
      <text:p text:style-name="P6">{object_options_2_fonctiondelapersonne}</text:p>
      <text:p text:style-name="P3"><text:s/><text:span text:style-name="T2">en service dans le diocèse de </text:span></text:p>
      <text:p text:style-name="P6">{object_options_2_diocsedemission}</text:p>
      <text:p text:style-name="P3"><text:span text:style-name="T2">et réside à :</text:span> </text:p>
      <text:p text:style-name="P6">{object_options_2_adressedersidence}</text:p>
      <text:p text:style-name="P3"/>
      <text:p text:style-name="P3"><text:tab/><text:span text:style-name="T2">En foi de quoi je délivre la présente attestation pour servir et valoir ce que de droit.</text:span></text:p>
      <text:p text:style-name="P3"/>
      <text:p text:style-name="P3"><text:tab/><text:span text:style-name="T2">Fait à Cotonou, le</text:span> {object_date_creation}</text:p>
      <text:p text:style-name="P4"/>
      <text:p text:style-name="P4"/>
      <text:p text:style-name="P4"/>
      <text:p text:style-name="P4"/>
      <text:p text:style-name="P4"/>
      <text:p text:style-name="P5"><text:tab/><text:tab/><text:tab/><text:tab/><text:tab/><text:tab/><text:tab/><text:tab/>+ Roger HOUNGBEDJI, op</text:p>
      <text:p text:style-name="P5"><text:s text:c="4"/><text:tab/><text:tab/><text:tab/><text:tab/><text:tab/><text:tab/><text:tab/><text:tab/> <text:s text:c="3"/>Archevêque de Coton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ega Junior</meta:initial-creator>
    <meta:creation-date>2024-12-13T00:17:56.36</meta:creation-date>
    <dc:date>2026-06-01T06:03:15.33</dc:date>
    <dc:creator>Omega Junior</dc:creator>
    <meta:editing-duration>PT11H46M59S</meta:editing-duration>
    <meta:editing-cycles>9</meta:editing-cycles>
    <meta:generator>OpenOffice/4.1.15$Win32 OpenOffice.org_project/4115m2$Build-9813</meta:generator>
    <meta:document-statistic meta:table-count="0" meta:image-count="0" meta:object-count="0" meta:page-count="1" meta:paragraph-count="13" meta:word-count="58" meta:character-count="483"/>
  </office:meta>
</office:document-meta>
</file>